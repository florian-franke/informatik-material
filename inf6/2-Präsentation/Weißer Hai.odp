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C00000099066F1F5D3.jpg" manifest:media-type="image/jpeg"/>
  <manifest:file-entry manifest:full-path="Pictures/1000000000000CEC000009B1F1F5393E.png" manifest:media-type="image/png"/>
  <manifest:file-entry manifest:full-path="Pictures/10000000000004B00000034309C7C567.jpg" manifest:media-type="image/jpeg"/>
  <manifest:file-entry manifest:full-path="Pictures/10000000000005910000027128DE441E.png" manifest:media-type="image/png"/>
  <manifest:file-entry manifest:full-path="Pictures/TablePreview1.svm" manifest:media-type=""/>
  <manifest:file-entry manifest:full-path="Pictures/100000000000054C0000023AAEAE8AC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1.1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10.574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2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loext:decorative="false"/>
    </style:style>
    <style:style style:name="gr10" style:family="graphic" style:parent-style-name="standard">
      <style:graphic-properties draw:fill-color="#0000ff" draw:textarea-horizontal-align="justify" draw:textarea-vertical-align="middle" draw:auto-grow-height="fals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12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2.95cm" fo:min-width="10.3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1.331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2cm" loext:decorative="false"/>
      <style:paragraph-properties style:writing-mode="lr-tb"/>
    </style:style>
    <style:style style:name="pr4" style:family="presentation" style:parent-style-name="Inspiration-outline1">
      <style:graphic-properties fo:min-height="11.929cm" loext:decorative="false"/>
      <style:paragraph-properties style:writing-mode="lr-tb"/>
    </style:style>
    <style:style style:name="pr5" style:family="presentation" style:parent-style-name="Inspiration-notes">
      <style:graphic-properties draw:fill-color="#ffffff" draw:auto-grow-height="false" fo:min-height="14cm" loext:decorative="false"/>
      <style:paragraph-properties style:writing-mode="lr-tb"/>
    </style:style>
    <style:style style:name="pr6" style:family="presentation" style:parent-style-name="Inspiration-outline1">
      <style:graphic-properties draw:stroke="none" draw:fill="none" fo:min-height="1.027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8.8cm" style:use-optimal-column-width="false"/>
    </style:style>
    <style:style style:name="co3" style:family="table-column">
      <style:table-column-properties style:column-width="9.3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="none"/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0000ff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.5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26pt"/>
    </style:style>
    <style:style style:name="P13" style:family="paragraph">
      <loext:graphic-properties draw:fill="none"/>
      <style:paragraph-properties fo:text-align="center"/>
      <style:text-properties fo:font-size="26pt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5000b" loext:opacity="100%"/>
    </style:style>
    <style:style style:name="T5" style:family="text">
      <style:text-properties fo:font-size="26pt"/>
    </style:style>
    <style:style style:name="T6" style:family="text">
      <style:text-properties fo:color="#c5000b" loext:opacity="100%"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r Weiße Hai</text:p>
          </draw:text-box>
        </draw:frame>
        <draw:frame draw:style-name="gr1" draw:text-style-name="P1" draw:layer="layout" svg:width="7.682cm" svg:height="1.4cm" svg:x="3.118cm" svg:y="4cm">
          <draw:text-box>
            <text:p><text:span text:style-name="T1">Carcharodon carcharias</text:span></text:p>
          </draw:text-box>
        </draw:frame>
        <draw:frame draw:style-name="gr2" draw:text-style-name="P2" draw:layer="layout" svg:width="11.8cm" svg:height="0.962cm" svg:x="1.3cm" svg:y="4cm">
          <draw:text-box>
            <text:p><text:span text:style-name="T1">Lat.:</text:span></text:p>
          </draw:text-box>
        </draw:frame>
        <draw:frame draw:style-name="gr2" draw:text-style-name="P2" draw:layer="layout" svg:width="21.4cm" svg:height="0.962cm" svg:x="1.2cm" svg:y="18.9cm">
          <draw:text-box>
            <text:p><text:span text:style-name="T1">Der „meißtgefürchtete“ Hai (1)</text:span></text:p>
          </draw:text-box>
        </draw:frame>
        <draw:frame draw:style-name="gr3" draw:text-style-name="P3" xml:id="id1" draw:id="id1" draw:layer="layout" svg:width="26.2cm" svg:height="13.6cm" svg:x="0.9cm" svg:y="5.2cm">
          <draw:image xlink:href="Pictures/10000000000004B00000034309C7C567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downward">
                  <anim:set smil:begin="0s" smil:dur="0.002s" smil:fill="hold" smil:targetElement="id1" smil:attributeName="visibility" smil:to="visible"/>
                  <anim:transitionFilter smil:dur="1s" smil:targetElement="id1" smil:type="checkerBoardWipe" smil:subtype="down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Übersicht</text:p>
          </draw:text-box>
        </draw:frame>
        <draw:frame presentation:style-name="pr4" draw:layer="layout" svg:width="25.2cm" svg:height="12.179cm" svg:x="1.163cm" svg:y="5.079cm" presentation:class="outline" presentation:user-transformed="true">
          <draw:text-box>
            <text:list text:style-name="L3">
              <text:list-header>
                <text:p xml:id="id2" text:id="id2"><text:a xlink:href="#Folie 3" xlink:type="simple">- Systematik</text:a></text:p>
                <text:p xml:id="id3" text:id="id3"><text:a xlink:href="#Folie 4" xlink:type="simple">- Verbreitung</text:a></text:p>
                <text:p xml:id="id4" text:id="id4"><text:a xlink:href="#Folie 5" xlink:type="simple">- Lebensraum</text:a></text:p>
                <text:p xml:id="id5" text:id="id5"><text:a xlink:href="#Folie 6" xlink:type="simple">- Körperbau</text:a></text:p>
                <text:p xml:id="id6" text:id="id6"><text:a xlink:href="#Folie 7" xlink:type="simple">- Verhalten</text:a><text:a xlink:href="#Folie 7" xlink:type="simple"> (Jagd;Fortpflanzung+Nachwuchs)</text:a></text:p>
                <text:p xml:id="id7" text:id="id7"><text:a xlink:href="#Folie 10" xlink:type="simple">- Quellen</text:a></text:p>
                <text:p xml:id="id8" text:id="id8"><text:a xlink:href="#Folie 11" xlink:type="simple">- Quiz</text:a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>
        <office:forms form:automatic-focus="false" form:apply-design-mode="false"/>
        <draw:custom-shape draw:style-name="gr5" draw:text-style-name="P5" draw:layer="layout" svg:width="11.074cm" svg:height="1.2cm" svg:x="8.926cm" svg:y="6.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0cm" svg:height="2cm" svg:x="1.4cm" svg:y="1.6cm" presentation:class="title">
          <draw:text-box>
            <text:p>Systematik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inordnung (3)</text:p>
              </text:list-item>
            </text:list>
          </draw:text-box>
        </draw:frame>
        <draw:frame draw:style-name="gr2" draw:text-style-name="P6" draw:layer="layout" svg:width="9cm" svg:height="0.962cm" svg:x="9.026cm" svg:y="6.8cm">
          <draw:text-box>
            <text:p text:style-name="P5"><text:s text:c="11"/>Stamm: Wirbeltiere</text:p>
          </draw:text-box>
        </draw:frame>
        <draw:g draw:style-name="gr6" xml:id="id9" draw:id="id9">
          <draw:line draw:style-name="gr7" draw:text-style-name="P3" draw:layer="layout" svg:x1="14.345cm" svg:y1="7.902cm" svg:x2="14.345cm" svg:y2="8.802cm">
            <text:p/>
          </draw:line>
          <draw:custom-shape draw:style-name="gr5" draw:text-style-name="P5" draw:layer="layout" svg:width="11.074cm" svg:height="1.2cm" svg:x="8.926cm" svg:y="8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9cm" svg:height="0.962cm" svg:x="9.926cm" svg:y="8.9cm">
            <draw:text-box>
              <text:p text:style-name="P5">Klasse: Knorpelfische </text:p>
            </draw:text-box>
          </draw:frame>
        </draw:g>
        <draw:g draw:style-name="gr6" xml:id="id10" draw:id="id10">
          <draw:line draw:style-name="gr7" draw:text-style-name="P3" draw:layer="layout" svg:x1="14.345cm" svg:y1="9.902cm" svg:x2="14.345cm" svg:y2="10.802cm">
            <text:p/>
          </draw:line>
          <draw:g draw:style-name="gr6">
            <draw:custom-shape draw:style-name="gr5" draw:text-style-name="P5" draw:layer="layout" svg:width="11.074cm" svg:height="1.2cm" svg:x="8.926cm" svg:y="10.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7" draw:layer="layout" svg:width="10.974cm" svg:height="0.962cm" svg:x="9.026cm" svg:y="10.9cm">
              <draw:text-box>
                <text:p text:style-name="P5"><text:s text:c="2"/>Ordnung: Makrelenhaie </text:p>
              </draw:text-box>
            </draw:frame>
          </draw:g>
        </draw:g>
        <draw:g draw:style-name="gr6" xml:id="id12" draw:id="id12">
          <draw:line draw:style-name="gr7" draw:text-style-name="P3" draw:layer="layout" svg:x1="14.345cm" svg:y1="14.002cm" svg:x2="14.345cm" svg:y2="14.902cm">
            <text:p/>
          </draw:line>
          <draw:custom-shape draw:style-name="gr5" draw:text-style-name="P5" draw:layer="layout" svg:width="11.074cm" svg:height="1.2cm" svg:x="8.926cm" svg:y="14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9cm" svg:height="0.962cm" svg:x="9.026cm" svg:y="15cm">
            <draw:text-box>
              <text:p text:style-name="P5"><text:s text:c="11"/>Gattung: Carcharodon </text:p>
            </draw:text-box>
          </draw:frame>
        </draw:g>
        <draw:g draw:style-name="gr6" xml:id="id11" draw:id="id11">
          <draw:line draw:style-name="gr7" draw:text-style-name="P3" draw:layer="layout" svg:x1="14.345cm" svg:y1="11.902cm" svg:x2="14.345cm" svg:y2="12.802cm">
            <text:p/>
          </draw:line>
          <draw:custom-shape draw:style-name="gr5" draw:text-style-name="P5" draw:layer="layout" svg:width="11.074cm" svg:height="1.2cm" svg:x="8.926cm" svg:y="12.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7" draw:layer="layout" svg:width="10.974cm" svg:height="1.002cm" svg:x="9.026cm" svg:y="12.9cm">
            <draw:text-box>
              <text:p text:style-name="P5"><text:s text:c="2"/>Familie: Makrelenhaie </text:p>
            </draw:text-box>
          </draw:frame>
        </draw:g>
        <draw:custom-shape draw:style-name="gr9" draw:text-style-name="P5" draw:layer="layout" svg:width="4.4cm" svg:height="1.621cm" svg:x="2.4cm" svg:y="17.3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6" draw:layer="layout" svg:width="4.2cm" svg:height="0.962cm" svg:x="2.8cm" svg:y="17.8cm">
          <draw:text-box>
            <text:p>Zu Übersich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Verbreitung (3), (4)</text:p>
          </draw:text-box>
        </draw:frame>
        <draw:frame draw:style-name="gr3" draw:text-style-name="P3" xml:id="id13" draw:id="id13" draw:layer="layout" svg:width="26.2cm" svg:height="12.4cm" svg:x="0.9cm" svg:y="5cm">
          <draw:image xlink:href="Pictures/10000000000005910000027128DE441E.png" xlink:type="simple" xlink:show="embed" xlink:actuate="onLoad" draw:mime-type="image/png">
            <text:p/>
          </draw:image>
        </draw:frame>
        <draw:custom-shape draw:style-name="gr10" draw:text-style-name="P8" draw:layer="layout" svg:width="0.8cm" svg:height="0.8cm" svg:x="8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9.6cm" svg:height="0.962cm" svg:x="9.1cm" svg:y="17.738cm">
          <draw:text-box>
            <text:p><text:span text:style-name="T1">=Hauptvorkommen</text:span></text:p>
          </draw:text-box>
        </draw:frame>
        <draw:custom-shape draw:style-name="gr9" draw:text-style-name="P5" draw:layer="layout" svg:width="0.8cm" svg:height="0.8cm" svg:x="8.2cm" svg:y="1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8.6cm" svg:height="1.2cm" svg:x="9.1cm" svg:y="18.7cm">
          <draw:text-box>
            <text:p><text:span text:style-name="T1">=Auftreten möglich</text:span></text:p>
          </draw:text-box>
        </draw:frame>
        <draw:custom-shape draw:style-name="gr9" draw:text-style-name="P5" draw:layer="layout" svg:width="4.4cm" svg:height="1.621cm" svg:x="2.4cm" svg:y="17.3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6" draw:layer="layout" svg:width="4.2cm" svg:height="0.962cm" svg:x="2.8cm" svg:y="17.8cm">
          <draw:text-box>
            <text:p>Zu Übersich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ebensraum (5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14" text:id="id14">im flachen Meer wo auch Robben,Seelöwen etc. leben</text:p>
              </text:list-item>
              <text:list-item>
                <text:p xml:id="id15" text:id="id15">an Rändern der Kontinente, an denen es steil hinab geht</text:p>
              </text:list-item>
              <text:list-item>
                <text:p xml:id="id16" text:id="id16">schwimmt an Meeresoberfläche und in Tiefe bis 1300 m</text:p>
              </text:list-item>
              <text:list-item>
                <text:p xml:id="id17" text:id="id17">in gemäßigten Regionen, aber auch in subtropischen <text:line-break/>und tropischen Meeren</text:p>
              </text:list-item>
              <text:list-item>
                <text:p xml:id="id18" text:id="id18">keine Einzelgänger (mit bis zu 10 anderen Exemplaren seiner Art in <text:s/>einer Gruppe)</text:p>
                <text:p/>
              </text:list-item>
            </text:list>
          </draw:text-box>
        </draw:frame>
        <draw:custom-shape draw:style-name="gr9" draw:text-style-name="P5" draw:layer="layout" svg:width="4.4cm" svg:height="1.621cm" svg:x="2.4cm" svg:y="17.3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6" draw:layer="layout" svg:width="4.2cm" svg:height="0.962cm" svg:x="2.8cm" svg:y="17.8cm">
          <draw:text-box>
            <text:p>Zu Übersich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er Körperbau (2), (5)</text:p>
          </draw:text-box>
        </draw:frame>
        <draw:frame draw:style-name="gr3" draw:text-style-name="P3" xml:id="id19" draw:id="id19" draw:layer="layout" svg:width="26.4cm" svg:height="14.2cm" svg:x="0.8cm" svg:y="5cm">
          <draw:image xlink:href="Pictures/100000000000054C0000023AAEAE8AC6.png" xlink:type="simple" xlink:show="embed" xlink:actuate="onLoad" draw:mime-type="image/png">
            <text:p/>
          </draw:image>
        </draw:frame>
        <draw:custom-shape draw:style-name="gr9" draw:text-style-name="P5" draw:layer="layout" svg:width="4.4cm" svg:height="1.621cm" svg:x="2.4cm" svg:y="18.5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6" draw:layer="layout" svg:width="4.2cm" svg:height="0.962cm" svg:x="2.8cm" svg:y="19cm">
          <draw:text-box>
            <text:p>Zu Übersicht</text:p>
          </draw:text-box>
        </draw:frame>
        <draw:line draw:style-name="gr12" draw:text-style-name="P3" draw:layer="layout" svg:x1="2.8cm" svg:y1="18.4cm" svg:x2="25.2cm" svg:y2="18.4cm">
          <text:p/>
        </draw:line>
        <draw:frame draw:style-name="gr13" draw:text-style-name="P6" draw:layer="layout" svg:width="6.21cm" svg:height="1.073cm" svg:x="10cm" svg:y="18.4cm">
          <draw:text-box>
            <text:p>Max. Länge: ca. 5m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19" smil:attributeName="visibility" smil:to="visible"/>
                  <anim:transitionFilter smil:dur="1s" smil:targetElement="id19" smil:type="randomBar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erhalten (6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Jagd:</text:p>
                <text:p xml:id="id21" text:id="id21">- der Weiße Hai ist Prädator (frisst lebende Organismen)</text:p>
                <text:p xml:id="id22" text:id="id22">- er kann einige Monate ohne Fressen überstehen, er lebt dann ausschließlich vom Öl, dass in der Leber gespeichert hat</text:p>
                <text:p xml:id="id23" text:id="id23">- sehr gutes Gehör (mehrere Kilometer weit)</text:p>
              </text:list-item>
              <text:list-item>
                <text:p xml:id="id20" text:id="id20">Ernährung:</text:p>
                <text:p xml:id="id24" text:id="id24">- Robben, Seevögel, Schwarmfische, Thunfische ,Seeotter</text:p>
                <text:p/>
              </text:list-item>
            </text:list>
          </draw:text-box>
        </draw:frame>
        <draw:custom-shape draw:style-name="gr9" draw:text-style-name="P5" draw:layer="layout" svg:width="4.4cm" svg:height="1.621cm" svg:x="2.4cm" svg:y="17.3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6" draw:layer="layout" svg:width="4.2cm" svg:height="0.962cm" svg:x="2.8cm" svg:y="17.8cm">
          <draw:text-box>
            <text:p>Zu Übersich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Fortpflanzung und Nachwuchs (3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Fortpflanzung:</text:p>
                <text:p>- Fortpflanzungsfähigkeit:</text:p>
                <text:p/>
                <text:p/>
                <text:p/>
                <text:p/>
                <text:p>- Fortpflanzung:</text:p>
                <text:list>
                  <text:list-header>
                    <text:p xml:id="id26" text:id="id26">- nicht viel darüber bekannt<text:line-break/>- Vermutung:</text:p>
                    <text:p xml:id="id27" text:id="id27"><text:s text:c="2"/>weil an den ausgewachsenen Weibchen Bissmarken entdeckt <text:s/>wurden -</text:p>
                    <text:p xml:id="id28" text:id="id28"><text:s text:c="2"/>Männchen halten sich bei Paarung an Weibchen fest</text:p>
                  </text:list-header>
                </text:list>
              </text:list-item>
            </text:list>
          </draw:text-box>
        </draw:frame>
        <draw:frame draw:style-name="gr14" xml:id="id25" draw:id="id25" draw:layer="layout" svg:width="22.868cm" svg:height="3.626cm" svg:x="2.555cm" svg:y="7.105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Geschlecht</text:p>
              </table:table-cell>
              <table:table-cell>
                <text:p>Alter beim Erreichen der Fortpflanzungsfähigkeit</text:p>
              </table:table-cell>
              <table:table-cell>
                <text:p>Größe beim Erreichen der Fortpflanzungsfähigkeit</text:p>
              </table:table-cell>
            </table:table-row>
            <table:table-row table:style-name="ro1" table:default-cell-style-name="ce1">
              <table:table-cell>
                <text:p>männlich</text:p>
              </table:table-cell>
              <table:table-cell>
                <text:p>9 o. 10 Jahre</text:p>
              </table:table-cell>
              <table:table-cell>
                <text:p>3,5-4 Meter</text:p>
              </table:table-cell>
            </table:table-row>
            <table:table-row table:style-name="ro1" table:default-cell-style-name="ce1">
              <table:table-cell>
                <text:p>weiblich</text:p>
              </table:table-cell>
              <table:table-cell>
                <text:p>12-14 Jahre</text:p>
              </table:table-cell>
              <table:table-cell>
                <text:p>4-5 Meter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Fortpflanzung und Nachwuchs (3)</text:p>
          </draw:text-box>
        </draw:frame>
        <draw:frame presentation:style-name="pr4" draw:layer="layout" svg:width="25.789cm" svg:height="12.179cm" svg:x="1.011cm" svg:y="4.96cm" presentation:class="outline" presentation:user-transformed="true">
          <draw:text-box>
            <text:list text:style-name="L3">
              <text:list-item>
                <text:p>Nachwuchs:</text:p>
                <text:p xml:id="id29" text:id="id29">- die 2-14 Jungtiere schlüpfen noch im Mutterleib aus den Eiern</text:p>
                <text:p xml:id="id30" text:id="id30">- Tragezeit wird auf etwa ein Jahr geschätzt</text:p>
                <text:p xml:id="id31" text:id="id31">- Geburt in warmgemäßigten Gebieten</text:p>
                <text:p xml:id="id32" text:id="id32">- Jungtiere sind zu dieser Zeit 120-150 cm groß und 26-32 <text:s/>kg <text:s text:c="2"/>schwer</text:p>
              </text:list-item>
              <text:list-item>
                <text:p xml:id="id33" text:id="id33">Lebenserwartung:</text:p>
                <text:p xml:id="id34" text:id="id34">- bei Männchen bis mindestens 73 Jahre</text:p>
                <text:p xml:id="id35" text:id="id35">- bei Weibchen bis 40 Jah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uelle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ilder</text:p>
                <text:p><text:span text:style-name="T2">- 1) de.wikipedia.org/wiki/Wei%C3%9Fer_Hai</text:span></text:p>
                <text:p><text:span text:style-name="T2">- 2) https://www.wwf.de/themen-projekte/artenlexikon/weisser-hai/</text:span></text:p>
              </text:list-item>
              <text:list-item>
                <text:p>Inhalt:</text:p>
                <text:p><text:span text:style-name="T2">- 3) https://www.kindernetz.de/wissen/tierlexikon/steckbrief-hai-100.html</text:span></text:p>
                <text:p text:style-name="P10"><text:span text:style-name="T3">- 4) </text:span><text:span text:style-name="T2">https://www.wwf.de/themen-projekte/artenlexikon/weisser-hai/</text:span></text:p>
                <text:p text:style-name="P10"><text:span text:style-name="T3">- 5) </text:span><text:span text:style-name="T2">de.wikipedia.org/wiki/Wei%C3%9Fer_Hai</text:span></text:p>
                <text:p><text:span text:style-name="T2">- 6) </text:span><text:span text:style-name="T2"><text:a xlink:href="http://www.hai.ch/" xlink:type="simple">www.hai.ch</text:a></text:span></text:p>
                <text:p><text:span text:style-name="T2">- 7) https://www.youtube.com/watch?v=ga0W6WNxhTY </text:span></text:p>
              </text:list-item>
            </text:list>
          </draw:text-box>
        </draw:frame>
        <draw:custom-shape draw:style-name="gr9" draw:text-style-name="P5" draw:layer="layout" svg:width="4.4cm" svg:height="1.621cm" svg:x="2.4cm" svg:y="17.3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6" draw:layer="layout" svg:width="4.2cm" svg:height="0.962cm" svg:x="2.8cm" svg:y="17.8cm">
          <draw:text-box>
            <text:p>Zu Übersicht</text:p>
          </draw:text-box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uiz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Hier sind noch einige Fragen um Dein neues Wissen über Haie zu testen.<text:line-break/><text:line-break/>Leg doch gleich mal los.<text:line-break/><text:line-break/>Bereit? Dann einfach auf das blaue Feld klicken!</text:p>
                <text:p><text:s/></text:p>
              </text:list-item>
            </text:list>
          </draw:text-box>
        </draw:frame>
        <draw:custom-shape draw:style-name="gr15" draw:text-style-name="P5" draw:layer="layout" svg:width="10.8cm" svg:height="3.2cm" svg:x="9cm" svg:y="12.9cm">
          <office:event-listeners>
            <presentation:event-listener script:event-name="dom:click" presentation:action="show" xlink:href="#page12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6.134cm" svg:height="1.277cm" svg:x="11cm" svg:y="13.9cm">
          <draw:text-box>
            <text:list text:style-name="L3">
              <text:list-header>
                <text:p>Los geht’s!</text:p>
              </text:list-header>
            </text:list>
          </draw:text-box>
        </draw:frame>
        <draw:custom-shape draw:style-name="gr9" draw:text-style-name="P5" draw:layer="layout" svg:width="4.4cm" svg:height="1.621cm" svg:x="2.4cm" svg:y="17.3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6" draw:layer="layout" svg:width="4.2cm" svg:height="0.962cm" svg:x="2.8cm" svg:y="17.8cm">
          <draw:text-box>
            <text:p>Zu Übersicht</text:p>
          </draw:text-box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uiz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Wie alt werden männliche Weiße Haie</text:p>
              </text:list-item>
            </text:list>
          </draw:text-box>
        </draw:frame>
        <draw:g draw:style-name="gr6">
          <draw:custom-shape draw:style-name="gr15" draw:text-style-name="P5" draw:layer="layout" svg:width="15.4cm" svg:height="3.2cm" svg:x="7.2cm" svg:y="7.8cm">
            <text:p/>
            <draw:enhanced-geometry svg:viewBox="0 0 21600 21600" draw:type="rectangle" draw:enhanced-path="M 0 0 L 21600 0 21600 21600 0 21600 0 0 Z N"/>
          </draw:custom-shape>
          <draw:frame presentation:style-name="pr6" draw:text-style-name="P11" draw:layer="layout" svg:width="8.746cm" svg:height="1.277cm" svg:x="10.052cm" svg:y="8.8cm">
            <draw:text-box>
              <text:list text:style-name="L3">
                <text:list-header>
                  <text:p><text:a xlink:href="#Folie 14" xlink:type="simple">A) Bis zu 40 Jahre</text:a></text:p>
                </text:list-header>
              </text:list>
            </draw:text-box>
          </draw:frame>
        </draw:g>
        <draw:g draw:style-name="gr6">
          <draw:custom-shape draw:style-name="gr15" draw:text-style-name="P5" draw:layer="layout" svg:width="15.4cm" svg:height="3.2cm" svg:x="7.2cm" svg:y="12cm">
            <text:p/>
            <draw:enhanced-geometry svg:viewBox="0 0 21600 21600" draw:type="rectangle" draw:enhanced-path="M 0 0 L 21600 0 21600 21600 0 21600 0 0 Z N"/>
          </draw:custom-shape>
          <draw:frame presentation:style-name="pr6" draw:text-style-name="P11" draw:layer="layout" svg:width="8.748cm" svg:height="1.277cm" svg:x="10.051cm" svg:y="13cm">
            <draw:text-box>
              <text:list text:style-name="L3">
                <text:list-header>
                  <text:p><text:a xlink:href="#Folie 13" xlink:type="simple">B) Über 70 Jahre</text:a></text:p>
                </text:list-header>
              </text:list>
            </draw:text-box>
          </draw:frame>
        </draw:g>
        <draw:frame draw:style-name="gr16" draw:text-style-name="P6" draw:layer="layout" svg:width="22cm" svg:height="1.187cm" svg:x="2.2cm" svg:y="4.2cm">
          <draw:text-box>
            <text:p/>
          </draw:text-box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uiz</text:p>
          </draw:text-box>
        </draw:frame>
        <draw:frame presentation:style-name="pr4" draw:layer="layout" svg:width="25.2cm" svg:height="1.8cm" svg:x="1.4cm" svg:y="5cm" presentation:class="outline" presentation:user-transformed="true">
          <draw:text-box>
            <text:list text:style-name="L3">
              <text:list-item>
                <text:p>Wie alt werden männliche Weiße Haie</text:p>
              </text:list-item>
            </text:list>
          </draw:text-box>
        </draw:frame>
        <draw:custom-shape draw:style-name="gr15" draw:text-style-name="P5" draw:layer="layout" svg:width="10.8cm" svg:height="3.2cm" svg:x="9cm" svg:y="8.1cm">
          <office:event-listeners>
            <presentation:event-listener script:event-name="dom:click" presentation:action="show" xlink:href="#page15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6.134cm" svg:height="1.277cm" svg:x="11cm" svg:y="9.1cm">
          <draw:text-box>
            <text:list text:style-name="L3">
              <text:list-header>
                <text:p>B) Bis zu 70 Jahre </text:p>
              </text:list-header>
            </text:list>
          </draw:text-box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draw:custom-shape draw:style-name="gr15" draw:text-style-name="P5" draw:layer="layout" svg:width="10.8cm" svg:height="3.2cm" svg:x="9cm" svg:y="12cm">
          <office:event-listeners>
            <presentation:event-listener script:event-name="dom:click" presentation:action="show" xlink:href="#page15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6.134cm" svg:height="1.277cm" svg:x="11cm" svg:y="13cm">
          <draw:text-box>
            <text:list text:style-name="L3">
              <text:list-header>
                <text:p><text:s/><text:span text:style-name="T4">Richtig!!!</text:span></text:p>
              </text:list-header>
            </text:list>
          </draw:text-box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uiz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Wie alt werden männliche Weiße Haie</text:p>
              </text:list-item>
            </text:list>
          </draw:text-box>
        </draw:frame>
        <draw:custom-shape draw:style-name="gr15" draw:text-style-name="P5" draw:layer="layout" svg:width="10.8cm" svg:height="3.2cm" svg:x="9cm" svg:y="8.1cm">
          <office:event-listeners>
            <presentation:event-listener script:event-name="dom:click" presentation:action="show" xlink:href="#page12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6.134cm" svg:height="1.277cm" svg:x="11cm" svg:y="9.1cm">
          <draw:text-box>
            <text:list text:style-name="L3">
              <text:list-header>
                <text:p>Leider falsch!!!</text:p>
              </text:list-header>
            </text:list>
          </draw:text-box>
          <office:event-listeners>
            <presentation:event-listener script:event-name="dom:click" presentation:action="show" xlink:href="#page12" xlink:type="simple" xlink:show="embed" xlink:actuate="onRequest"/>
          </office:event-listeners>
        </draw:frame>
        <draw:custom-shape draw:style-name="gr15" draw:text-style-name="P5" draw:layer="layout" svg:width="10.8cm" svg:height="3.2cm" svg:x="9cm" svg:y="12cm">
          <office:event-listeners>
            <presentation:event-listener script:event-name="dom:click" presentation:action="show" xlink:href="#page12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3" draw:layer="layout" svg:width="6.134cm" svg:height="1.277cm" svg:x="11cm" svg:y="13cm">
          <draw:text-box>
            <text:list text:style-name="L3">
              <text:list-header>
                <text:p text:style-name="P5"><text:span text:style-name="T4">Versuche es nochmal!</text:span></text:p>
              </text:list-header>
            </text:list>
          </draw:text-box>
          <office:event-listeners>
            <presentation:event-listener script:event-name="dom:click" presentation:action="show" xlink:href="#page12" xlink:type="simple" xlink:show="embed" xlink:actuate="onRequest"/>
          </office:event-listeners>
        </draw:frame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uiz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it welchem Alter erreichen die Weißen Hai-Weibchen die Fortpflanzungsfähigkeit? </text:p>
              </text:list-item>
            </text:list>
          </draw:text-box>
        </draw:frame>
        <draw:g draw:style-name="gr6">
          <draw:custom-shape draw:style-name="gr15" draw:text-style-name="P5" draw:layer="layout" svg:width="17cm" svg:height="3.2cm" svg:x="6.4cm" svg:y="8.1cm">
            <text:p/>
            <draw:enhanced-geometry svg:viewBox="0 0 21600 21600" draw:type="rectangle" draw:enhanced-path="M 0 0 L 21600 0 21600 21600 0 21600 0 0 Z N"/>
          </draw:custom-shape>
          <draw:frame presentation:style-name="pr6" draw:text-style-name="P11" draw:layer="layout" svg:width="9.656cm" svg:height="1.277cm" svg:x="9.548cm" svg:y="9.1cm">
            <draw:text-box>
              <text:list text:style-name="L3">
                <text:list-header>
                  <text:p><text:a xlink:href="#Folie 16" xlink:type="simple">A) Mit 12-14 Jahren</text:a></text:p>
                </text:list-header>
              </text:list>
            </draw:text-box>
          </draw:frame>
        </draw:g>
        <draw:g draw:style-name="gr6">
          <draw:custom-shape draw:style-name="gr15" draw:text-style-name="P5" draw:layer="layout" svg:width="17cm" svg:height="3.2cm" svg:x="6.4cm" svg:y="12cm">
            <text:p/>
            <draw:enhanced-geometry svg:viewBox="0 0 21600 21600" draw:type="rectangle" draw:enhanced-path="M 0 0 L 21600 0 21600 21600 0 21600 0 0 Z N"/>
          </draw:custom-shape>
          <draw:frame presentation:style-name="pr6" draw:text-style-name="P11" draw:layer="layout" svg:width="9.657cm" svg:height="1.277cm" svg:x="9.548cm" svg:y="13cm">
            <draw:text-box>
              <text:list text:style-name="L3">
                <text:list-header>
                  <text:p><text:a xlink:href="#Folie 17" xlink:type="simple">B) Mit 9 - 1O Jahren</text:a></text:p>
                </text:list-header>
              </text:list>
            </draw:text-box>
          </draw:frame>
        </draw:g>
        <draw:frame draw:style-name="gr17" draw:text-style-name="P6" draw:layer="layout" svg:width="28cm" svg:height="21.581cm" svg:x="0cm" svg:y="0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uiz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it welchem Alter erreichen die Weißen Hai-Weibchen die Fortpflanzungsfähigkeit? </text:p>
              </text:list-item>
            </text:list>
          </draw:text-box>
        </draw:frame>
        <draw:custom-shape draw:style-name="gr15" draw:text-style-name="P5" draw:layer="layout" svg:width="10.8cm" svg:height="3.2cm" svg:x="9cm" svg:y="8.1cm">
          <office:event-listeners>
            <presentation:event-listener script:event-name="dom:click" presentation:action="show" xlink:href="#page18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6.134cm" svg:height="1.277cm" svg:x="11cm" svg:y="9.1cm">
          <draw:text-box>
            <text:list text:style-name="L3">
              <text:list-header>
                <text:p>A)Mit 12-14 Jahren <text:s/></text:p>
              </text:list-header>
            </text:list>
          </draw:text-box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draw:custom-shape draw:style-name="gr15" draw:text-style-name="P5" draw:layer="layout" svg:width="10.8cm" svg:height="3.2cm" svg:x="9cm" svg:y="12cm">
          <office:event-listeners>
            <presentation:event-listener script:event-name="dom:click" presentation:action="show" xlink:href="#page18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6.134cm" svg:height="1.277cm" svg:x="11cm" svg:y="13cm">
          <draw:text-box>
            <text:list text:style-name="L3">
              <text:list-header>
                <text:p><text:s/><text:span text:style-name="T4">Richtig!!!</text:span></text:p>
              </text:list-header>
            </text:list>
          </draw:text-box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uiz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Mit welchem Alter erreichen die Weißen Hai-Weibchen die Fortpflanzungsfähigkeit?</text:p>
              </text:list-item>
            </text:list>
          </draw:text-box>
        </draw:frame>
        <draw:custom-shape draw:style-name="gr15" draw:text-style-name="P5" draw:layer="layout" svg:width="10.8cm" svg:height="3.2cm" svg:x="9cm" svg:y="8.1cm">
          <office:event-listeners>
            <presentation:event-listener script:event-name="dom:click" presentation:action="show" xlink:href="#page15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6.134cm" svg:height="1.277cm" svg:x="11cm" svg:y="9.1cm">
          <draw:text-box>
            <text:list text:style-name="L3">
              <text:list-header>
                <text:p><text:span text:style-name="T5">Leider falsch!!!</text:span></text:p>
              </text:list-header>
            </text:list>
          </draw:text-box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draw:custom-shape draw:style-name="gr15" draw:text-style-name="P5" draw:layer="layout" svg:width="10.8cm" svg:height="3.2cm" svg:x="9cm" svg:y="12cm">
          <office:event-listeners>
            <presentation:event-listener script:event-name="dom:click" presentation:action="show" xlink:href="#page15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6.134cm" svg:height="1.277cm" svg:x="11cm" svg:y="13cm">
          <draw:text-box>
            <text:list text:style-name="L3">
              <text:list-header>
                <text:p text:style-name="P5"><text:span text:style-name="T6">Versuche es nochmal!</text:span></text:p>
              </text:list-header>
            </text:list>
          </draw:text-box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uiz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Zu welcher Familie gehört der Weiße Hai? </text:p>
              </text:list-item>
            </text:list>
          </draw:text-box>
        </draw:frame>
        <draw:g draw:style-name="gr6">
          <draw:custom-shape draw:style-name="gr15" draw:text-style-name="P5" draw:layer="layout" svg:width="17.2cm" svg:height="3.2cm" svg:x="5.6cm" svg:y="8.1cm">
            <text:p/>
            <draw:enhanced-geometry svg:viewBox="0 0 21600 21600" draw:type="rectangle" draw:enhanced-path="M 0 0 L 21600 0 21600 21600 0 21600 0 0 Z N"/>
          </draw:custom-shape>
          <draw:frame presentation:style-name="pr6" draw:text-style-name="P11" draw:layer="layout" svg:width="9.769cm" svg:height="1.277cm" svg:x="8.785cm" svg:y="9.1cm">
            <draw:text-box>
              <text:list text:style-name="L3">
                <text:list-header>
                  <text:p><text:a xlink:href="#Folie 19" xlink:type="simple">A) Makrelenhaie</text:a></text:p>
                </text:list-header>
              </text:list>
            </draw:text-box>
          </draw:frame>
        </draw:g>
        <draw:g draw:style-name="gr6">
          <draw:custom-shape draw:style-name="gr15" draw:text-style-name="P5" draw:layer="layout" svg:width="17.2cm" svg:height="3.2cm" svg:x="5.6cm" svg:y="12cm">
            <text:p/>
            <draw:enhanced-geometry svg:viewBox="0 0 21600 21600" draw:type="rectangle" draw:enhanced-path="M 0 0 L 21600 0 21600 21600 0 21600 0 0 Z N"/>
          </draw:custom-shape>
          <draw:frame presentation:style-name="pr6" draw:text-style-name="P11" draw:layer="layout" svg:width="9.768cm" svg:height="1.277cm" svg:x="8.786cm" svg:y="13cm">
            <draw:text-box>
              <text:list text:style-name="L3">
                <text:list-header>
                  <text:p><text:a xlink:href="#Folie 20" xlink:type="simple">B) Requiemhaie</text:a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uiz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Zu welcher Familie gehört der Weiße Hai? </text:p>
              </text:list-item>
            </text:list>
          </draw:text-box>
        </draw:frame>
        <draw:custom-shape draw:style-name="gr15" draw:text-style-name="P5" draw:layer="layout" svg:width="10.8cm" svg:height="3.2cm" svg:x="9cm" svg:y="8.1cm">
          <office:event-listeners>
            <presentation:event-listener script:event-name="dom:click" presentation:action="show" xlink:href="#page21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6.134cm" svg:height="1.277cm" svg:x="11cm" svg:y="9.1cm">
          <draw:text-box>
            <text:list text:style-name="L3">
              <text:list-header>
                <text:p><text:span text:style-name="T5">A) Makrelenhai</text:span></text:p>
              </text:list-header>
            </text:list>
          </draw:text-box>
          <office:event-listeners>
            <presentation:event-listener script:event-name="dom:click" presentation:action="show" xlink:href="#page21" xlink:type="simple" xlink:show="embed" xlink:actuate="onRequest"/>
          </office:event-listeners>
        </draw:frame>
        <draw:custom-shape draw:style-name="gr15" draw:text-style-name="P5" draw:layer="layout" svg:width="10.8cm" svg:height="3.2cm" svg:x="9cm" svg:y="12cm">
          <office:event-listeners>
            <presentation:event-listener script:event-name="dom:click" presentation:action="show" xlink:href="#page21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6.134cm" svg:height="1.277cm" svg:x="11cm" svg:y="13cm">
          <draw:text-box>
            <text:list text:style-name="L3">
              <text:list-header>
                <text:p><text:span text:style-name="T5"><text:s/></text:span><text:span text:style-name="T6">Richtig!!!</text:span></text:p>
              </text:list-header>
            </text:list>
          </draw:text-box>
          <office:event-listeners>
            <presentation:event-listener script:event-name="dom:click" presentation:action="show" xlink:href="#page21" xlink:type="simple" xlink:show="embed" xlink:actuate="onRequest"/>
          </office:event-listeners>
        </draw:frame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Quiz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Zu welcher Familie gehört der Weiße Hai?</text:p>
              </text:list-item>
            </text:list>
          </draw:text-box>
        </draw:frame>
        <draw:custom-shape draw:style-name="gr15" draw:text-style-name="P5" draw:layer="layout" svg:width="10.8cm" svg:height="3.2cm" svg:x="9cm" svg:y="8.1cm">
          <office:event-listeners>
            <presentation:event-listener script:event-name="dom:click" presentation:action="show" xlink:href="#page18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6.134cm" svg:height="1.277cm" svg:x="11cm" svg:y="9.1cm">
          <draw:text-box>
            <text:list text:style-name="L3">
              <text:list-header>
                <text:p><text:span text:style-name="T5">Leider falsch!!!</text:span></text:p>
              </text:list-header>
            </text:list>
          </draw:text-box>
          <office:event-listeners>
            <presentation:event-listener script:event-name="dom:click" presentation:action="show" xlink:href="#page18" xlink:type="simple" xlink:show="embed" xlink:actuate="onRequest"/>
          </office:event-listeners>
        </draw:frame>
        <draw:custom-shape draw:style-name="gr15" draw:text-style-name="P5" draw:layer="layout" svg:width="10.8cm" svg:height="3.2cm" svg:x="9cm" svg:y="12cm">
          <office:event-listeners>
            <presentation:event-listener script:event-name="dom:click" presentation:action="show" xlink:href="#page18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6.134cm" svg:height="1.277cm" svg:x="11cm" svg:y="13cm">
          <draw:text-box>
            <text:list text:style-name="L3">
              <text:list-header>
                <text:p text:style-name="P5"><text:span text:style-name="T6">Versuche es nochmal!</text:span></text:p>
              </text:list-header>
            </text:list>
          </draw:text-box>
          <office:event-listeners>
            <presentation:event-listener script:event-name="dom:click" presentation:action="show" xlink:href="#page18" xlink:type="simple" xlink:show="embed" xlink:actuate="onRequest"/>
          </office:event-listeners>
        </draw:frame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Ende</text:p>
          </draw:text-box>
        </draw:frame>
        <draw:frame draw:style-name="gr18" draw:text-style-name="P3" draw:layer="layout" svg:width="26.4cm" svg:height="14.001cm" svg:x="0.8cm" svg:y="4.999cm" presentation:class="graphic" presentation:user-transformed="true">
          <draw:image xlink:href="Pictures/1000000000000CC00000099066F1F5D3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2" draw:display-name="Linienspitzen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Comment" style:family="graphic">
      <style:paragraph-properties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_20_Term" style:display-name="Definition Term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5-05-16T00:51:02.995000000</meta:creation-date>
    <dc:date>2025-05-15T07:16:53.741241300</dc:date>
    <meta:editing-duration>PT3H11M35S</meta:editing-duration>
    <meta:editing-cycles>31</meta:editing-cycles>
    <meta:generator>LibreOffice/25.2.3.2$Windows_X86_64 LibreOffice_project/bbb074479178df812d175f709636b368952c2ce3</meta:generator>
    <meta:document-statistic meta:object-count="206"/>
  </office:meta>
</office:document-meta>
</file>